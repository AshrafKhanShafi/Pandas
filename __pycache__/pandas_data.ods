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mo" svg:font-family="Arimo" style:font-family-generic="swiss" style:font-pitch="variable"/>
    <style:font-face style:name="Cambria" svg:font-family="Cambria" style:font-family-generic="roman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09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716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7854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Cambria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Cambria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Cambria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andas_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Buying_Product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him Ahm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haka</text:p>
          </table:table-cell>
          <table:table-cell office:value-type="float" office:value="1711223344" calcext:value-type="float">
            <text:p>1711223344</text:p>
          </table:table-cell>
          <table:table-cell office:value-type="string" calcext:value-type="string">
            <text:p>rahim.ahmed@gmail.com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im Hoss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ttogram</text:p>
          </table:table-cell>
          <table:table-cell office:value-type="float" office:value="1822334455" calcext:value-type="float">
            <text:p>1822334455</text:p>
          </table:table-cell>
          <table:table-cell office:value-type="string" calcext:value-type="string">
            <text:p>karim.hossain@yahoo.com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yesha Ak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hulna</text:p>
          </table:table-cell>
          <table:table-cell office:value-type="float" office:value="1933445566" calcext:value-type="float">
            <text:p>1933445566</text:p>
          </table:table-cell>
          <table:table-cell office:value-type="string" calcext:value-type="string">
            <text:p>ayesha.akter@gmail.com</text:p>
          </table:table-cell>
          <table:table-cell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srat Jah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jshahi</text:p>
          </table:table-cell>
          <table:table-cell office:value-type="float" office:value="1644556677" calcext:value-type="float">
            <text:p>1644556677</text:p>
          </table:table-cell>
          <table:table-cell office:value-type="string" calcext:value-type="string">
            <text:p>nusrat.jahan@gmail.com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bbir Has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ylhet</text:p>
          </table:table-cell>
          <table:table-cell table:style-name="ce3" office:value-type="float" office:value="1555667788" calcext:value-type="float">
            <text:p>1555667788</text:p>
          </table:table-cell>
          <table:table-cell office:value-type="string" calcext:value-type="string">
            <text:p>sabbir.hasan@outlook.com</text:p>
          </table:table-cell>
          <table:table-cell office:value-type="string" calcext:value-type="string">
            <text:p>Headpho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rzana Isl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rishal</text:p>
          </table:table-cell>
          <table:table-cell office:value-type="float" office:value="1366778899" calcext:value-type="float">
            <text:p>1366778899</text:p>
          </table:table-cell>
          <table:table-cell office:value-type="string" calcext:value-type="string">
            <text:p>farzana.islam@gmail.com</text:p>
          </table:table-cell>
          <table:table-cell office:value-type="string" calcext:value-type="string">
            <text:p>Pri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nvir Rahm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ngpur</text:p>
          </table:table-cell>
          <table:table-cell office:value-type="float" office:value="1477889900" calcext:value-type="float">
            <text:p>1477889900</text:p>
          </table:table-cell>
          <table:table-cell office:value-type="string" calcext:value-type="string">
            <text:p>tanvir.rahman@gmail.com</text:p>
          </table:table-cell>
          <table:table-cell office:value-type="string" calcext:value-type="string">
            <text:p>USB Dri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hedi Has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ymensingh</text:p>
          </table:table-cell>
          <table:table-cell office:value-type="float" office:value="1788990011" calcext:value-type="float">
            <text:p>1788990011</text:p>
          </table:table-cell>
          <table:table-cell office:value-type="string" calcext:value-type="string">
            <text:p>mehedi.hasan@yahoo.com</text:p>
          </table:table-cell>
          <table:table-cell office:value-type="string" calcext:value-type="string">
            <text:p>Smartp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natul Ferdo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milla</text:p>
          </table:table-cell>
          <table:table-cell office:value-type="float" office:value="1899001122" calcext:value-type="float">
            <text:p>1899001122</text:p>
          </table:table-cell>
          <table:table-cell office:value-type="string" calcext:value-type="string">
            <text:p>jannat.ferdous@gmail.com</text:p>
          </table:table-cell>
          <table:table-cell office:value-type="string" calcext:value-type="string">
            <text:p>Power Ba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f Chowdhu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zipur</text:p>
          </table:table-cell>
          <table:table-cell office:value-type="float" office:value="1910112233" calcext:value-type="float">
            <text:p>1910112233</text:p>
          </table:table-cell>
          <table:table-cell office:value-type="string" calcext:value-type="string">
            <text:p>arif.chowdhury@gmail.com</text:p>
          </table:table-cell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Default" table:formula="of:=SUM([.C2:.C11])" office:value-type="float" office:value="275" calcext:value-type="float">
            <text:p>275</text:p>
          </table:table-cell>
          <table:table-cell table:style-name="Default" table:number-columns-repeated="4"/>
          <table:table-cell table:style-name="Default" table:formula="of:=SUM([.H2:.H10])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mo" svg:font-family="Arimo" style:font-family-generic="swiss" style:font-pitch="variable"/>
    <style:font-face style:name="Cambria" svg:font-family="Cambria" style:font-family-generic="roman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2T16:59:27.116323883</dc:date>
    <meta:editing-duration>PT7M48S</meta:editing-duration>
    <meta:editing-cycles>1</meta:editing-cycles>
    <meta:document-statistic meta:table-count="1" meta:cell-count="89" meta:object-count="0"/>
    <meta:generator>LibreOffice/26.2.2.2$Linux_X86_64 LibreOffice_project/620$Build-2</meta:generator>
  </office:meta>
</office:document-meta>
</file>